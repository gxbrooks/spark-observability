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xmlns:presentation="urn:oasis:names:tc:opendocument:xmlns:presentation:1.0" office:version="1.3">
  <office:body>
    <office:presentation>
      <draw:page draw:name="Title" draw:style-name="dp1" draw:master-page-name="Standard">
        <draw:frame presentation:style-name="pr1" draw:layer="layout" svg:width="25cm" svg:height="3.5cm" svg:x="1.5cm" svg:y="6cm">
          <draw:text-box>
            <text:p text:style-name="T1">ServiceNow &amp; Dynatrace Model Enrichment and Cross Correlation</text:p>
            <text:p text:style-name="T2">Version-controlled CSDM intent, runtime workload labels, and cross-platform compare</text:p>
          </draw:text-box>
        </draw:frame>
      </draw:page>
      <draw:page draw:name="DataFlow" draw:style-name="dp1" draw:master-page-name="Standard">
        <draw:frame draw:layer="layout" svg:width="26cm" svg:height="1.2cm" svg:x="1cm" svg:y="0.4cm">
          <draw:text-box>
            <text:p text:style-name="T2">Data flow — specifications, processing, and platform outputs</text:p>
          </draw:text-box>
        </draw:frame>
        <draw:rect draw:style-name="gr1" text:style-name="P1" svg:width="3.6cm" svg:height="1.4cm" svg:x="0.8cm" svg:y="2.2cm">
          <text:p text:style-name="P1">*.csdm.yaml</text:p>
        </draw:rect>
        <draw:rect draw:style-name="gr1" text:style-name="P1" svg:width="3.6cm" svg:height="1.4cm" svg:x="0.8cm" svg:y="4.2cm">
          <text:p text:style-name="P1">region.yaml</text:p>
        </draw:rect>
        <draw:rect draw:style-name="gr1" text:style-name="P1" svg:width="3.6cm" svg:height="1.4cm" svg:x="0.8cm" svg:y="6.2cm">
          <text:p text:style-name="P1">docker-compose.yml</text:p>
        </draw:rect>
        <draw:rect draw:style-name="gr1" text:style-name="P1" svg:width="3.6cm" svg:height="1.4cm" svg:x="0.8cm" svg:y="8.2cm">
          <text:p text:style-name="P1">K8s / DynaKube specs</text:p>
        </draw:rect>
        <draw:regular-polygon draw:style-name="gr2" text:style-name="P1" draw:corners="6" draw:sharpness="50%" svg:width="3.8cm" svg:height="2.2cm" svg:x="5.5cm" svg:y="3.2cm">
          <text:p text:style-name="P1">csdm/deploy.yml</text:p>
        </draw:regular-polygon>
        <draw:regular-polygon draw:style-name="gr2" text:style-name="P1" draw:corners="6" draw:sharpness="50%" svg:width="3.8cm" svg:height="2.2cm" svg:x="5.5cm" svg:y="6.2cm">
          <text:p text:style-name="P1">discovery/* + sync_pod_labels</text:p>
        </draw:regular-polygon>
        <draw:regular-polygon draw:style-name="gr2" text:style-name="P1" draw:corners="6" draw:sharpness="50%" svg:width="3.8cm" svg:height="2.2cm" svg:x="10.2cm" svg:y="4.8cm">
          <text:p text:style-name="P1">compare.yml</text:p>
        </draw:regular-polygon>
        <draw:rect draw:style-name="gr1" text:style-name="P1" svg:width="3.8cm" svg:height="1.4cm" svg:x="15.2cm" svg:y="2.0cm">
          <text:p text:style-name="P1">ServiceNow CSDM + CMDB</text:p>
        </draw:rect>
        <draw:rect draw:style-name="gr1" text:style-name="P1" svg:width="3.8cm" svg:height="1.4cm" svg:x="15.2cm" svg:y="4.2cm">
          <text:p text:style-name="P1">Docker runtime</text:p>
        </draw:rect>
        <draw:rect draw:style-name="gr1" text:style-name="P1" svg:width="3.8cm" svg:height="1.4cm" svg:x="15.2cm" svg:y="6.4cm">
          <text:p text:style-name="P1">Kubernetes runtime</text:p>
        </draw:rect>
        <draw:rect draw:style-name="gr1" text:style-name="P1" svg:width="3.8cm" svg:height="1.4cm" svg:x="15.2cm" svg:y="8.6cm">
          <text:p text:style-name="P1">Dynatrace tenant</text:p>
        </draw:rect>
        <draw:rect draw:style-name="gr1" text:style-name="P1" svg:width="4.5cm" svg:height="2.0cm" svg:x="20.5cm" svg:y="4.8cm">
          <text:p text:style-name="P1">DT_SN_Model_Comparison_Report.json</text:p>
        </draw:rect>
        <draw:line draw:style-name="gr3" svg:x1="4.4cm" svg:y1="2.9cm" svg:x2="5.5cm" svg:y2="4.0cm">
          <svg:desc>flow</svg:desc>
        </draw:line>
        <draw:line draw:style-name="gr3" svg:x1="4.4cm" svg:y1="4.9cm" svg:x2="5.5cm" svg:y2="4.2cm">
          <svg:desc>flow</svg:desc>
        </draw:line>
        <draw:line draw:style-name="gr3" svg:x1="4.4cm" svg:y1="6.9cm" svg:x2="5.5cm" svg:y2="7.0cm">
          <svg:desc>flow</svg:desc>
        </draw:line>
        <draw:line draw:style-name="gr3" svg:x1="4.4cm" svg:y1="8.9cm" svg:x2="5.5cm" svg:y2="7.4cm">
          <svg:desc>flow</svg:desc>
        </draw:line>
        <draw:line draw:style-name="gr3" svg:x1="9.3cm" svg:y1="4.3cm" svg:x2="15.2cm" svg:y2="2.7cm">
          <svg:desc>flow</svg:desc>
        </draw:line>
        <draw:line draw:style-name="gr3" svg:x1="9.3cm" svg:y1="7.3cm" svg:x2="15.2cm" svg:y2="5.0cm">
          <svg:desc>flow</svg:desc>
        </draw:line>
        <draw:line draw:style-name="gr3" svg:x1="9.3cm" svg:y1="7.3cm" svg:x2="15.2cm" svg:y2="7.1cm">
          <svg:desc>flow</svg:desc>
        </draw:line>
        <draw:line draw:style-name="gr3" svg:x1="14.0cm" svg:y1="5.9cm" svg:x2="10.2cm" svg:y2="5.9cm">
          <svg:desc>flow</svg:desc>
        </draw:line>
        <draw:line draw:style-name="gr3" svg:x1="14.0cm" svg:y1="7.1cm" svg:x2="10.2cm" svg:y2="6.2cm">
          <svg:desc>flow</svg:desc>
        </draw:line>
        <draw:line draw:style-name="gr3" svg:x1="14.0cm" svg:y1="3.5cm" svg:x2="10.2cm" svg:y2="5.2cm">
          <svg:desc>flow</svg:desc>
        </draw:line>
        <draw:line draw:style-name="gr3" svg:x1="19.0cm" svg:y1="5.7cm" svg:x2="20.5cm" svg:y2="5.7cm">
          <svg:desc>flow</svg:desc>
        </draw:line>
        <draw:frame draw:layer="layout" svg:width="26cm" svg:height="1.5cm" svg:x="1cm" svg:y="10.5cm">
          <draw:text-box>
            <text:p text:style-name="P2">Square = version-controlled input or platform output. Hexagon = Ansible playbook / process. Compare defaults to full CMDB + full tenant; scope filters live in scope_applied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office:version="1.3">
  <office:font-face-decls>
    <style:font-face style:name="Arial" svg:font-family="Arial"/>
    <style:font-face style:name="DejaVu Sans" svg:font-family="'DejaVu Sans'"/>
  </office:font-face-decls>
  <office:styles>
    <style:style style:name="dp1" style:family="drawing-page">
      <style:drawing-page-properties draw:background-size="full" draw:fill="solid" draw:fill-color="#0b1424"/>
    </style:style>
    <style:style style:name="gr1" style:family="graphic">
      <style:graphic-properties draw:stroke="solid" draw:stroke-color="#00bcd4" draw:stroke-width="0.04cm" draw:fill="solid" draw:fill-color="#132238" draw:shadow="visible" draw:shadow-offset-x="0.08cm" draw:shadow-offset-y="0.08cm"/>
    </style:style>
    <style:style style:name="gr2" style:family="graphic">
      <style:graphic-properties draw:stroke="solid" draw:stroke-color="#4fc3f7" draw:stroke-width="0.04cm" draw:fill="solid" draw:fill-color="#1a3358"/>
    </style:style>
    <style:style style:name="gr3" style:family="graphic">
      <style:graphic-properties draw:stroke="solid" draw:stroke-color="#80cbc4" draw:stroke-width="0.04cm" draw:fill="solid" draw:fill-color="#12304a"/>
    </style:style>
    <style:style style:name="P1" style:family="paragraph">
      <style:text-properties fo:font-size="14pt" fo:font-weight="bold" fo:color="#e8f4ff"/>
    </style:style>
    <style:style style:name="P2" style:family="paragraph">
      <style:text-properties fo:font-size="11pt" fo:color="#b0c4de"/>
    </style:style>
    <style:style style:name="T1" style:family="text">
      <style:text-properties fo:font-size="28pt" fo:font-weight="bold" fo:color="#ffffff"/>
    </style:style>
    <style:style style:name="T2" style:family="text">
      <style:text-properties fo:font-size="16pt" fo:color="#90caf9"/>
    </style:style>
  </office:styles>
  <office:automatic-styles>
    <style:page-layout style:name="pm1">
      <style:page-layout-properties fo:page-width="28cm" fo:page-height="21cm" style:print-orientation="landscape"/>
    </style:page-layout>
  </office:automatic-styles>
  <office:master-styles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spark-observability build_dt_sn_concepts_odp.py</meta:generator>
    <dc:title>ServiceNow and Dynatrace Model Enrichment and Cross Correlation</dc:title>
    <dc:description>High-level data flow for CSDM, runtime specs, playbooks, and platform outputs.</dc:description>
  </office:meta>
</office:document-meta>
</file>